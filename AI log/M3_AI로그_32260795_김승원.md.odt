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OpenSymbol" svg:font-family="OpenSymbol" style:font-charset="x-symbol"/>
    <style:font-face style:name="나눔고딕" svg:font-family="나눔고딕"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P1" style:family="paragraph" style:parent-style-name="Heading_20_2">
      <style:text-properties fo:font-size="13.1999998092651pt" officeooo:rsid="000dca22" officeooo:paragraph-rsid="000dca22" style:font-size-asian="11pt" style:font-size-complex="13.1999998092651pt"/>
    </style:style>
    <style:style style:name="P2" style:family="paragraph" style:parent-style-name="Heading_20_3">
      <style:text-properties officeooo:paragraph-rsid="000dca22"/>
    </style:style>
    <style:style style:name="P3" style:family="paragraph" style:parent-style-name="Standard" style:list-style-name="WWNum7"/>
    <style:style style:name="P4" style:family="paragraph" style:parent-style-name="Standard" style:list-style-name="WWNum8"/>
    <style:style style:name="P5" style:family="paragraph" style:parent-style-name="Standard" style:list-style-name="WWNum9"/>
    <style:style style:name="P6" style:family="paragraph" style:parent-style-name="Standard" style:list-style-name="WWNum10"/>
    <style:style style:name="P7" style:family="paragraph" style:parent-style-name="Standard" style:list-style-name="WWNum11"/>
    <style:style style:name="P8" style:family="paragraph" style:parent-style-name="Standard" style:list-style-name="WWNum12"/>
    <style:style style:name="P9" style:family="paragraph" style:parent-style-name="Standard" style:list-style-name="WWNum1"/>
    <style:style style:name="P10" style:family="paragraph" style:parent-style-name="Standard" style:list-style-name="WWNum2"/>
    <style:style style:name="P11" style:family="paragraph" style:parent-style-name="Standard" style:list-style-name="WWNum3"/>
    <style:style style:name="P12" style:family="paragraph" style:parent-style-name="Standard" style:list-style-name="WWNum4"/>
    <style:style style:name="P13" style:family="paragraph" style:parent-style-name="Standard" style:list-style-name="WWNum5"/>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style:font-name="Courier New" style:font-name-complex="Courier New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이름: 김승원</text:p>
      <text:p text:style-name="Standard">학번: 32260795</text:p>
      <text:p text:style-name="Standard">역할: QA/보안</text:p>
      <text:p text:style-name="Standard">도구: Chat GPT</text:p>
      <text:p text:style-name="Standard">작성일: 2026-06-18</text:p>
      <text:p text:style-name="Standard"/>
      <text:h text:style-name="P1" text:outline-level="2">프롬프트</text:h>
      <text:p text:style-name="Text_20_body">AI에게 다음과 같은 조건을 부여하였다.</text:p>
      <text:list text:style-name="L1">
        <text:list-item>
          <text:p text:style-name="P15">서울에 거주하는 20대 대학생</text:p>
        </text:list-item>
        <text:list-item>
          <text:p text:style-name="P15">자취 중</text:p>
        </text:list-item>
        <text:list-item>
          <text:p text:style-name="P15">가정 형편은 중간 수준</text:p>
        </text:list-item>
        <text:list-item>
          <text:p text:style-name="P15">마른 체형과 낮은 체력을 가지고 있음</text:p>
        </text:list-item>
        <text:list-item>
          <text:p text:style-name="P15">체력 및 체격 개선을 위해 헬스장 등록을 고려함</text:p>
        </text:list-item>
        <text:list-item>
          <text:p text:style-name="P15">헬스장 이용 과정에서 불편함을 경험한 사용자</text:p>
        </text:list-item>
        <text:list-item>
          <text:p text:style-name="P14">운동 관련 앱 개발을 위한 인터뷰 참여자</text:p>
        </text:list-item>
      </text:list>
      <text:p text:style-name="Text_20_body">이후 "헬스장에 등록하고 운동을 하는 도중에 불편함을 겪었던 부분을 말해주십시오."라는 질문을 제시하였다.</text:p>
      <text:p text:style-name="Text_20_body">AI는 헬스장 초보 이용자의 입장에서 다음과 같은 불편 사항을 제시하였다.</text:p>
      <text:list text:style-name="L2">
        <text:list-item>
          <text:p text:style-name="P17">운동 기구 사용법을 몰라 사용에 어려움을 느낌</text:p>
        </text:list-item>
        <text:list-item>
          <text:p text:style-name="P17">자신의 체형과 목표에 맞는 운동 루틴을 찾기 어려움</text:p>
        </text:list-item>
        <text:list-item>
          <text:p text:style-name="P17">운동 기록을 직접 관리해야 하여 번거로움</text:p>
        </text:list-item>
        <text:list-item>
          <text:p text:style-name="P17">헬스장의 혼잡도를 미리 알 수 없음</text:p>
        </text:list-item>
        <text:list-item>
          <text:p text:style-name="P17">자취 생활로 인해 식단 관리가 어려움</text:p>
        </text:list-item>
        <text:list-item>
          <text:p text:style-name="P16">시간이 지나면서 운동 동기가 감소함</text:p>
        </text:list-item>
      </text:list>
      <text:p text:style-name="Text_20_body">또한 AI는 이 중 가장 큰 문제로 "어떤 운동을 해야 하는지 모르는 점"과 "운동 기록 관리의 번거로움"을 제시하였다.</text:p>
      <text:h text:style-name="Heading_20_3" text:outline-level="3">비판적 검토</text:h>
      <text:p text:style-name="Text_20_body">AI는 초보 헬스 이용자가 겪을 수 있는 다양한 불편 사항을 제시해 아이디어 도출에 도움이 되었다. 그러나 답변이 일반적인 사례 위주로 구성되어 있어 실제 사용자의 경험이라고 보기 어렵고, 각 문제의 중요도나 우선순위에 대한 근거도 부족하였다. 또한 혼잡도 확인 기능과 같이 구현 난이도가 높은 기능에 대한 현실적인 고려가 부족하다는 한계가 있었다.</text:p>
      <text:h text:style-name="Heading_20_3" text:outline-level="3">수정 내용</text:h>
      <text:p text:style-name="Text_20_body">AI가 제시한 의견을 그대로 사용하지 않고 우리 앱의 목적에 맞게 수정하였다. 운동 루틴 추천과 기록 관리 기능의 필요성은 반영하되, 프로젝트의 핵심 기능인 실시간 자세 분석, 자세 오류 피드백, 관절 부담 경고 기능을 추가하여 초보 운동자의 부상 예방에 초점을 <text:soft-page-break/>맞추도록 보완하였다.</text:p>
      <text:h text:style-name="Heading_20_3" text:outline-level="3">AI 활용 변화·한계·개선 계획</text:h>
      <text:p text:style-name="Text_20_body">AI를 활용하여 짧은 시간 안에 다양한 사용자 요구사항을 수집할 수 있었고, 이를 통해 앱 기능 아이디어를 구체화할 수 있었다. 하지만 AI의 답변은 실제 인터뷰 결과가 아니므로 신뢰성에 한계가 있다. 따라서 이후에는 실제 헬스장 이용자를 대상으로 추가 인터뷰를 진행하고 프로토타입 테스트를 통해 기능의 필요성과 사용성을 검증할 계획이다.</text:p>
      <text:p text:style-name="Standard"/>
      <text:h text:style-name="P2" text:outline-level="3">프롬프트</text:h>
      <text:h text:style-name="P2" text:outline-level="3">"앱을 개발할 때 어떤 기능이 들어갔으면 좋겠습니까?"</text:h>
      <text:h text:style-name="Heading_20_3" text:outline-level="3">AI 응답 요약</text:h>
      <text:p text:style-name="Text_20_body">AI는 초보 헬스 이용자의 입장에서 개인 맞춤 운동 루틴 추천, 운동 기록 관리, 기구 사용법 안내, 식단 추천, 운동 알림 및 동기부여, 헬스장 혼잡도 확인 기능 등을 제안하였다. 또한 이러한 기능들을 개발자가 구현할 수 있도록 실시간 자세 분석, 자세 오류 감지, 관절 부담 경고, 운동 기록 저장, 운동 계획 추천 등의 기능 요구사항으로 구체화하였다. 특히 각 요구사항에 우선순위를 부여하고 측정 가능하고 검증 가능한 형태로 정리하였다.</text:p>
      <text:h text:style-name="Heading_20_3" text:outline-level="3">비판적 검토</text:h>
      <text:p text:style-name="Text_20_body">AI는 초보 헬스 이용자의 관점에서 필요한 기능을 다양하게 제안하였고, 이후 이를 개발자가 구현할 수 있는 수준의 요구사항으로 구체화하였다. 특히 요구사항을 정량적으로 표현하여 기능을 명확하게 정의한 점은 도움이 되었다. 그러나 일부 기능은 실제 개발 환경이나 기술적 제약을 충분히 고려하지 못하였으며, 예를 들어 헬스장 혼잡도 확인 기능은 데이터 수집 방식과 개인정보 문제에 대한 검토가 부족하였다. 또한 실제 사용자 인터뷰 결과가 아닌 일반적인 사례를 바탕으로 생성된 답변이라는 한계가 있었다.</text:p>
      <text:h text:style-name="Heading_20_3" text:outline-level="3">수정 내용</text:h>
      <text:p text:style-name="Text_20_body">AI가 제안한 기능과 요구사항을 그대로 사용하지 않고 프로젝트의 목적에 맞게 수정하였다. 운동 루틴 추천과 운동 기록 관리 기능은 참고하였으나, 우리 팀이 개발하려는 앱의 핵심 기능인 실시간 자세 분석, 자세 오류 피드백, 관절 부담 경고 기능을 중심으로 요구사항을 재정리하였다. 또한 일부 기능은 구현 가능성과 개발 기간을 고려하여 우선순위를 조정하고 세부 기능을 구체화하였다.</text:p>
      <text:h text:style-name="Heading_20_3" text:outline-level="3">AI 활용 변화·한계·개선 계획</text:h>
      <text:p text:style-name="Text_20_body">AI를 활용하여 사용자 요구사항과 기능 아이디어를 빠르게 수집하고 이를 요구사항 문서 형태로 정리할 수 있었다. 특히 추상적인 아이디어를 구체적인 기능 요구사항으로 발전시키는 과정에서 도움이 되었다. 하지만 AI의 답변은 실제 사용자의 의견이 아닌 일반적인 사례를 바탕으로 생성된 결과이므로 신뢰성에 한계가 있다. 따라서 이후에는 실제 사용자 인터뷰와 프로토타입 테스트를 통해 요구사항을 검증하고, 수집된 피드백을 바탕으로 기능을 개선할 계획이다.</text:p>
      <text:p text:style-name="Standard"/>
      <text:p text:style-name="Standard"><text:soft-page-break/></text:p>
      <text:h text:style-name="Heading_20_3" text:outline-level="3">프롬프트</text:h>
      <text:p text:style-name="Text_20_body">"시스템은 카메라를 이용하여 사용자의 운동 자세를 초당 5회 이상 분석하고, 화면에 자세 상태를 실시간으로 표시해야 한다. 시스템은 허리 굽힘, 무릎 정렬 이상, 어깨 비대칭 등 사전에 정의된 자세 오류를 감지할 경우 1초 이내에 음성 또는 화면 메시지로 피드백을 제공해야 한다. 시스템은 관절 각도가 안전 기준 범위를 벗어나거나 부상 위험이 높은 자세가 감지될 경우 즉시 경고 메시지와 경고음을 제공해야 한다. ... 이걸 바탕으로 유스케이스를 제작해줘."</text:p>
      <text:h text:style-name="Heading_20_3" text:outline-level="3">AI 응답 요약</text:h>
      <text:p text:style-name="Text_20_body">AI는 제시된 기능 요구사항을 바탕으로 실시간 자세 분석, 자세 오류 피드백, 부상 위험 경고, 대체 운동 추천, 운동 강도 자동 조정, 음식 사진 분석, 성과 리포트 생성 등 총 7개의 유스케이스를 도출하였다. 또한 각 유스케이스의 목적, 액터, 사전 조건, 기본 흐름, 예외 흐름 및 결과를 정리하였으며, include 및 extend 관계를 활용하여 유스케이스 간의 관계도 함께 제시하였다.</text:p>
      <text:h text:style-name="Heading_20_3" text:outline-level="3">비판적 검토</text:h>
      <text:p text:style-name="Text_20_body">AI는 요구사항을 분석하여 주요 기능을 유스케이스 형태로 체계적으로 정리하였고, 유스케이스 간 관계까지 도출하여 설계 과정에 도움을 주었다. 그러나 일부 include 및 extend 관계는 UML 관점에서 적절성을 다시 검토할 필요가 있었다. 예를 들어 성과 리포트 생성이 음식 사진 분석을 반드시 포함한다고 보기 어려우며, 운동 강도 자동 조정과 대체 운동 추천의 관계 역시 필수적인 확장 관계로 보기 어렵다. 또한 실제 사용 시나리오보다 기능 중심으로 작성되어 사용자의 행동 흐름이 충분히 반영되지 않은 부분이 있었다.</text:p>
      <text:h text:style-name="Heading_20_3" text:outline-level="3">수정 내용</text:h>
      <text:p text:style-name="Text_20_body">AI가 작성한 유스케이스를 참고하여 프로젝트의 핵심 기능인 실시간 자세 분석, 자세 오류 피드백, 부상 위험 경고를 중심으로 구조를 재정리하였다. 또한 일부 include 및 extend 관계를 삭제하거나 수정하여 UML 표기 규칙에 맞게 보완하였으며, 실제 사용자가 운동을 시작하고 결과를 확인하는 흐름이 자연스럽게 연결되도록 시나리오를 개선하였다.</text:p>
      <text:h text:style-name="Heading_20_3" text:outline-level="3">AI 활용 변화·한계·개선 계획</text:h>
      <text:p text:style-name="Text_20_body">AI를 활용하여 기능 요구사항을 빠르게 유스케이스 형태로 변환할 수 있었으며, 설계 단계에서 필요한 액터와 기능을 정리하는 데 도움을 받았다. 하지만 AI가 생성한 유스케이스는 UML 규칙을 완벽하게 반영하지 못하거나 실제 서비스 흐름과 맞지 않는 관계를 포함하는 경우가 있었다. 따라서 이후에는 AI가 생성한 결과를 그대로 사용하는 것이 아니라 UML 작성 기준과 프로젝트 요구사항을 바탕으로 검토 및 수정하는 과정을 거칠 계획이다.</text:p>
      <text:p text:style-name="Standard"/>
      <text:p text:style-name="Standard"/>
      <text:h text:style-name="Heading_20_3" text:outline-level="3"><text:soft-page-break/>프롬프트</text:h>
      <text:p text:style-name="Text_20_body">"깃허브에 올릴 건데, 코드로 만들어 줄 수 있니?"</text:p>
      <text:h text:style-name="Heading_20_3" text:outline-level="3">AI 응답 요약</text:h>
      <text:p text:style-name="Text_20_body">AI는 앞서 작성한 유스케이스를 바탕으로 GitHub 및 UML 도구에서 활용할 수 있는 PlantUML 코드를 생성하였다. 코드에는 사용자 액터와 실시간 자세 분석, 자세 오류 피드백, 부상 위험 경고, 대체 운동 추천, 운동 강도 자동 조정, 음식 사진 분석, 성과 리포트 생성 등의 유스케이스가 포함되었으며, include 및 extend 관계와 각 기능에 대한 설명 노트도 함께 작성되었다.</text:p>
      <text:h text:style-name="Heading_20_3" text:outline-level="3">비판적 검토</text:h>
      <text:p text:style-name="Text_20_body">AI는 유스케이스 다이어그램을 코드 형태로 자동 생성하여 UML 도구에서 바로 활용할 수 있도록 지원하였다. 이를 통해 다이어그램을 직접 작성하는 시간을 줄일 수 있었다. 이 작업물을 확인하고 별다른 문제점을 찾지 못해 팀 회의방에 그대로 제출했었다.</text:p>
      <text:h text:style-name="Heading_20_3" text:outline-level="3">AI 활용 변화·한계·개선 계획</text:h>
      <text:p text:style-name="Text_20_body">AI를 활용하여 텍스트 형태의 요구사항을 UML 코드로 빠르게 변환할 수 있었으며, 설계 문서를 작성하는 시간을 단축할 수 있었다. AI를 활용해 초안을 생성한 후 팀원들과 함께 검토하고 수정하는 과정을 통해 보다 정확한 설계 문서를 작성할 계획이다.</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OpenSymbol" svg:font-family="OpenSymbol" style:font-charset="x-symbol"/>
    <style:font-face style:name="나눔고딕" svg:font-family="나눔고딕"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맑은 고딕" fo:font-size="11pt" fo:language="en" fo:country="US" style:letter-kerning="true" style:font-name-asian="맑은 고딕1" style:font-size-asian="11pt" style:language-asian="ko" style:country-asian="K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11cm" style:writing-mode="page"/>
      <style:text-properties style:use-window-font-color="true" loext:opacity="0%" style:font-name="맑은 고딕" fo:font-size="11pt" fo:language="en" fo:country="US" style:letter-kerning="true" style:font-name-asian="맑은 고딕1" style:font-size-asian="11pt" style:language-asian="ko" style:country-asian="KR"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나눔고딕" style:font-family-asian="나눔고딕" style:font-family-generic-asian="system" style:font-pitch-asian="variable" style:font-size-asian="10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Heading_20_1" style:display-name="Heading 1" style:family="paragraph" style:parent-style-name="Standard" style:next-style-name="Standard" loext:linked-style-name="제목_20_1_20_Char" style:default-outline-level="1" style:list-style-name="" style:class="text">
      <style:paragraph-properties fo:margin-top="0.494cm" fo:margin-bottom="0.141cm" style:contextual-spacing="false" fo:keep-together="always" fo:keep-with-next="always"/>
      <style:text-properties fo:color="#000000" loext:opacity="100%" style:font-name="맑은 고딕" fo:font-family="'맑은 고딕'" style:font-family-generic="roman" style:font-pitch="variable" fo:font-size="16pt" style:font-name-asian="맑은 고딕1" style:font-family-asian="'맑은 고딕'" style:font-family-generic-asian="system" style:font-pitch-asian="variable" style:font-size-asian="16pt" style:font-name-complex="F"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제목_20_2_20_Char" style:default-outline-level="2" style:list-style-name="" style:class="text">
      <style:paragraph-properties fo:margin-top="0.282cm" fo:margin-bottom="0.141cm" style:contextual-spacing="false" fo:keep-together="always" fo:keep-with-next="always"/>
      <style:text-properties fo:color="#000000" loext:opacity="100%" style:font-name="맑은 고딕" fo:font-family="'맑은 고딕'" style:font-family-generic="roman" style:font-pitch="variable" fo:font-size="14pt" style:font-name-asian="맑은 고딕1" style:font-family-asian="'맑은 고딕'" style:font-family-generic-asian="system" style:font-pitch-asian="variable" style:font-size-asian="14pt" style:font-name-complex="F" style:font-family-generic-complex="system" style:font-pitch-complex="variable" style:font-size-complex="14pt">
        <loext:char-complex-color loext:theme-type="dark1" loext:color-type="theme"/>
      </style:text-properties>
    </style:style>
    <style:style style:name="Heading_20_3" style:display-name="Heading 3" style:family="paragraph" style:parent-style-name="Standard" style:next-style-name="Standard" loext:linked-style-name="제목_20_3_20_Char" style:default-outline-level="3" style:list-style-name="" style:class="text">
      <style:paragraph-properties fo:margin-top="0.282cm" fo:margin-bottom="0.141cm" style:contextual-spacing="false" fo:keep-together="always" fo:keep-with-next="always"/>
      <style:text-properties fo:color="#000000" loext:opacity="100%" style:font-name="맑은 고딕" fo:font-family="'맑은 고딕'" style:font-family-generic="roman" style:font-pitch="variable" fo:font-size="12pt" style:font-name-asian="맑은 고딕1" style:font-family-asian="'맑은 고딕'" style:font-family-generic-asian="system" style:font-pitch-asian="variable" style:font-size-asian="12pt" style:font-name-complex="F" style:font-family-generic-complex="system" style:font-pitch-complex="variable">
        <loext:char-complex-color loext:theme-type="dark1" loext:color-type="theme"/>
      </style:text-properties>
    </style:style>
    <style:style style:name="Heading_20_4" style:display-name="Heading 4" style:family="paragraph" style:parent-style-name="Standard" style:next-style-name="Standard" loext:linked-style-name="제목_20_4_20_Char" style:default-outline-level="4" style:list-style-name="" style:class="text">
      <style:paragraph-properties fo:margin-top="0.141cm" fo:margin-bottom="0.071cm" style:contextual-spacing="false" fo:keep-together="always" fo:keep-with-next="always"/>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Heading_20_5" style:display-name="Heading 5" style:family="paragraph" style:parent-style-name="Standard" style:next-style-name="Standard" loext:linked-style-name="제목_20_5_20_Char" style:default-outline-level="5" style:list-style-name="" style:class="text">
      <style:paragraph-properties fo:margin-left="0.176cm" fo:margin-top="0.141cm" fo:margin-bottom="0.071cm" style:contextual-spacing="false" fo:keep-together="always" fo:keep-with-next="always"/>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Heading_20_6" style:display-name="Heading 6" style:family="paragraph" style:parent-style-name="Standard" style:next-style-name="Standard" loext:linked-style-name="제목_20_6_20_Char" style:default-outline-level="6" style:list-style-name="" style:class="text">
      <style:paragraph-properties fo:margin-left="0.353cm" fo:margin-top="0.141cm" fo:margin-bottom="0.071cm" style:contextual-spacing="false" fo:keep-together="always" fo:keep-with-next="always"/>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Heading_20_7" style:display-name="Heading 7" style:family="paragraph" style:parent-style-name="Standard" style:next-style-name="Standard" loext:linked-style-name="제목_20_7_20_Char" style:default-outline-level="7" style:list-style-name="" style:class="text">
      <style:paragraph-properties fo:margin-left="0.529cm" fo:margin-top="0.141cm" fo:margin-bottom="0.071cm" style:contextual-spacing="false" fo:keep-together="always" fo:keep-with-next="always"/>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Heading_20_8" style:display-name="Heading 8" style:family="paragraph" style:parent-style-name="Standard" style:next-style-name="Standard" loext:linked-style-name="제목_20_8_20_Char" style:default-outline-level="8" style:list-style-name="" style:class="text">
      <style:paragraph-properties fo:margin-left="0.706cm" fo:margin-top="0.141cm" fo:margin-bottom="0.071cm" style:contextual-spacing="false" fo:keep-together="always" fo:keep-with-next="always"/>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Heading_20_9" style:display-name="Heading 9" style:family="paragraph" style:parent-style-name="Standard" style:next-style-name="Standard" loext:linked-style-name="제목_20_9_20_Char" style:default-outline-level="9" style:list-style-name="" style:class="text">
      <style:paragraph-properties fo:margin-left="0.882cm" fo:margin-top="0.141cm" fo:margin-bottom="0.071cm" style:contextual-spacing="false" fo:keep-together="always" fo:keep-with-next="always"/>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Title" style:family="paragraph" style:parent-style-name="Standard" style:next-style-name="Standard" loext:linked-style-name="제목_20_Char" style:class="chapter">
      <style:paragraph-properties fo:margin-top="0cm" fo:margin-bottom="0.141cm" style:contextual-spacing="true" fo:text-align="center" style:justify-single-word="false"/>
      <style:text-properties style:font-name="맑은 고딕" fo:font-family="'맑은 고딕'" style:font-family-generic="roman" style:font-pitch="variable" fo:font-size="28pt" fo:letter-spacing="-0.018cm" style:letter-kerning="true" style:font-name-asian="맑은 고딕1" style:font-family-asian="'맑은 고딕'"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부제_20_Char" style:class="chapter">
      <style:paragraph-properties fo:text-align="center" style:justify-single-word="false"/>
      <style:text-properties fo:color="#595959" loext:opacity="100%" style:font-name="맑은 고딕" fo:font-family="'맑은 고딕'" style:font-family-generic="roman" style:font-pitch="variable" fo:font-size="14pt" fo:letter-spacing="0.026cm" style:font-name-asian="맑은 고딕1" style:font-family-asian="'맑은 고딕'"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인용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강한_20_인용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제목_20_1_20_Char" style:display-name="제목 1 Char" style:family="text" style:parent-style-name="Default_20_Paragraph_20_Font_20__28_WW_29_">
      <style:text-properties fo:color="#000000" loext:opacity="100%" style:font-name="맑은 고딕" fo:font-family="'맑은 고딕'" style:font-family-generic="roman" style:font-pitch="variable" fo:font-size="16pt" style:font-name-asian="맑은 고딕1" style:font-family-asian="'맑은 고딕'" style:font-family-generic-asian="system" style:font-pitch-asian="variable" style:font-size-asian="16pt" style:font-name-complex="F" style:font-family-generic-complex="system" style:font-pitch-complex="variable" style:font-size-complex="16pt">
        <loext:char-complex-color loext:theme-type="dark1" loext:color-type="theme"/>
      </style:text-properties>
    </style:style>
    <style:style style:name="제목_20_2_20_Char" style:display-name="제목 2 Char" style:family="text" style:parent-style-name="Default_20_Paragraph_20_Font_20__28_WW_29_">
      <style:text-properties fo:color="#000000" loext:opacity="100%" style:font-name="맑은 고딕" fo:font-family="'맑은 고딕'" style:font-family-generic="roman" style:font-pitch="variable" fo:font-size="14pt" style:font-name-asian="맑은 고딕1" style:font-family-asian="'맑은 고딕'" style:font-family-generic-asian="system" style:font-pitch-asian="variable" style:font-size-asian="14pt" style:font-name-complex="F" style:font-family-generic-complex="system" style:font-pitch-complex="variable" style:font-size-complex="14pt">
        <loext:char-complex-color loext:theme-type="dark1" loext:color-type="theme"/>
      </style:text-properties>
    </style:style>
    <style:style style:name="제목_20_3_20_Char" style:display-name="제목 3 Char" style:family="text" style:parent-style-name="Default_20_Paragraph_20_Font_20__28_WW_29_">
      <style:text-properties fo:color="#000000" loext:opacity="100%" style:font-name="맑은 고딕" fo:font-family="'맑은 고딕'" style:font-family-generic="roman" style:font-pitch="variable" fo:font-size="12pt" style:font-name-asian="맑은 고딕1" style:font-family-asian="'맑은 고딕'" style:font-family-generic-asian="system" style:font-pitch-asian="variable" style:font-size-asian="12pt" style:font-name-complex="F" style:font-family-generic-complex="system" style:font-pitch-complex="variable">
        <loext:char-complex-color loext:theme-type="dark1" loext:color-type="theme"/>
      </style:text-properties>
    </style:style>
    <style:style style:name="제목_20_4_20_Char" style:display-name="제목 4 Char" style:family="text" style:parent-style-name="Default_20_Paragraph_20_Font_20__28_WW_29_">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제목_20_5_20_Char" style:display-name="제목 5 Char" style:family="text" style:parent-style-name="Default_20_Paragraph_20_Font_20__28_WW_29_">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제목_20_6_20_Char" style:display-name="제목 6 Char" style:family="text" style:parent-style-name="Default_20_Paragraph_20_Font_20__28_WW_29_">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제목_20_7_20_Char" style:display-name="제목 7 Char" style:family="text" style:parent-style-name="Default_20_Paragraph_20_Font_20__28_WW_29_">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제목_20_8_20_Char" style:display-name="제목 8 Char" style:family="text" style:parent-style-name="Default_20_Paragraph_20_Font_20__28_WW_29_">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제목_20_9_20_Char" style:display-name="제목 9 Char" style:family="text" style:parent-style-name="Default_20_Paragraph_20_Font_20__28_WW_29_">
      <style:text-properties fo:color="#000000" loext:opacity="100%"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loext:char-complex-color loext:theme-type="dark1" loext:color-type="theme"/>
      </style:text-properties>
    </style:style>
    <style:style style:name="제목_20_Char" style:display-name="제목 Char" style:family="text" style:parent-style-name="Default_20_Paragraph_20_Font_20__28_WW_29_" loext:linked-style-name="Title">
      <style:text-properties style:font-name="맑은 고딕" fo:font-family="'맑은 고딕'" style:font-family-generic="roman" style:font-pitch="variable" fo:font-size="28pt" fo:letter-spacing="-0.018cm" style:letter-kerning="true" style:font-name-asian="맑은 고딕1" style:font-family-asian="'맑은 고딕'" style:font-family-generic-asian="system" style:font-pitch-asian="variable" style:font-size-asian="28pt" style:font-name-complex="F" style:font-family-generic-complex="system" style:font-pitch-complex="variable" style:font-size-complex="28pt"/>
    </style:style>
    <style:style style:name="부제_20_Char" style:display-name="부제 Char" style:family="text" style:parent-style-name="Default_20_Paragraph_20_Font_20__28_WW_29_">
      <style:text-properties fo:color="#595959" loext:opacity="100%" style:font-name="맑은 고딕" fo:font-family="'맑은 고딕'" style:font-family-generic="roman" style:font-pitch="variable" fo:font-size="14pt" fo:letter-spacing="0.026cm" style:font-name-asian="맑은 고딕1" style:font-family-asian="'맑은 고딕'"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인용_20_Char" style:display-name="인용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강한_20_인용_20_Char" style:display-name="강한 인용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테마">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3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승원 김</meta:initial-creator>
    <meta:editing-cycles>2</meta:editing-cycles>
    <meta:creation-date>2026-06-20T12:09:00</meta:creation-date>
    <dc:date>2026-06-21T22:31:36.544000000</dc:date>
    <meta:editing-duration>PT1H39M14S</meta:editing-duration>
    <meta:generator>LibreOffice/24.2.0.3$Windows_x86 LibreOffice_project/da48488a73ddd66ea24cf16bbc4f7b9c08e9bea1</meta:generator>
    <meta:document-statistic meta:table-count="0" meta:image-count="0" meta:object-count="0" meta:page-count="4" meta:paragraph-count="57" meta:word-count="2911" meta:character-count="3966" meta:non-whitespace-character-count="3046"/>
    <meta:user-defined meta:name="AppVersion">16.0000</meta:user-defined>
    <meta:template xlink:type="simple" xlink:actuate="onRequest" xlink:title="Normal" xlink:href=""/>
  </office:meta>
</office:document-meta>
</file>